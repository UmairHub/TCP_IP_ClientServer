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ce70a" officeooo:paragraph-rsid="001ce70a"/>
    </style:style>
    <style:style style:name="P2" style:family="paragraph" style:parent-style-name="Text_20_body">
      <style:text-properties officeooo:rsid="001ce70a" officeooo:paragraph-rsid="001ce70a"/>
    </style:style>
    <style:style style:name="P3" style:family="paragraph" style:parent-style-name="Heading_20_3">
      <style:text-properties officeooo:rsid="001db26c" officeooo:paragraph-rsid="001db26c"/>
    </style:style>
    <style:style style:name="P4" style:family="paragraph" style:parent-style-name="Text_20_body">
      <style:text-properties officeooo:rsid="001db26c" officeooo:paragraph-rsid="001db26c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>
      <style:text-properties officeooo:paragraph-rsid="001db26c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db26c" style:font-size-asian="10pt" style:font-size-complex="10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nnecting local PC (Ubuntu) to Rasberry Pi over Ethernet cable</text:h>
      <text:p text:style-name="P2">Why: for file Transfer</text:p>
      <text:h text:style-name="Heading_20_3" text:outline-level="3">Ethernet connection (Ubuntu ↔ Raspberry Pi) — short steps</text:h>
      <text:p text:style-name="Text_20_body"><text:span text:style-name="Strong_20_Emphasis">1. Check link (both sides)</text:span></text:p>
      <text:section text:style-name="Sect1" text:name="code-block-viewer">
        <text:p text:style-name="P5"><text:span text:style-name="Source_20_Text">ip addr</text:span></text:p>
      </text:section>
      <text:p text:style-name="Text_20_body">(You saw <text:span text:style-name="Source_20_Text">UP</text:span> / <text:span text:style-name="Source_20_Text">LOWER_UP</text:span>, so cable is OK)</text:p>
      <text:p text:style-name="Horizontal_20_Line"/>
      <text:p text:style-name="Text_20_body"><text:span text:style-name="Strong_20_Emphasis">2. Assign static IPs (no DHCP available)</text:span></text:p>
      <text:p text:style-name="Text_20_body">Ubuntu:</text:p>
      <text:section text:style-name="Sect1" text:name="Section1">
        <text:p text:style-name="P5"><text:bookmark text:name="code-block-viewer"/><text:span text:style-name="Source_20_Text">sudo ip addr add 192.168.10.1/24 dev enp6s0</text:span></text:p>
      </text:section>
      <text:p text:style-name="Text_20_body">Raspberry Pi:</text:p>
      <text:section text:style-name="Sect1" text:name="Section2">
        <text:p text:style-name="P5"><text:bookmark text:name="code-block-viewer2"/><text:span text:style-name="Source_20_Text">sudo ip addr add 192.168.10.2/24 dev eth0</text:span></text:p>
      </text:section>
      <text:p text:style-name="Horizontal_20_Line"/>
      <text:p text:style-name="Text_20_body"><text:span text:style-name="Strong_20_Emphasis">3. Test connection</text:span><text:line-break/>From Ubuntu:</text:p>
      <text:section text:style-name="Sect1" text:name="Section3">
        <text:p text:style-name="P5"><text:bookmark text:name="code-block-viewer3"/><text:span text:style-name="Source_20_Text">ping 192.168.10.2</text:span></text:p>
      </text:section>
      <text:p text:style-name="Text_20_body">From Pi:</text:p>
      <text:section text:style-name="Sect1" text:name="Section4">
        <text:p text:style-name="P5"><text:bookmark text:name="code-block-viewer4"/><text:span text:style-name="Source_20_Text">ping 192.168.10.1</text:span></text:p>
      </text:section>
      <text:p text:style-name="Horizontal_20_Line"/>
      <text:p text:style-name="Text_20_body"><text:span text:style-name="Strong_20_Emphasis">4. (Optional) SSH access</text:span></text:p>
      <text:section text:style-name="Sect1" text:name="Section5">
        <text:p text:style-name="P5"><text:bookmark text:name="code-block-viewer5"/><text:span text:style-name="Source_20_Text">ssh pi@192.168.10.2</text:span></text:p>
      </text:section>
      <text:p text:style-name="Horizontal_20_Line"/>
      <text:h text:style-name="P3" text:outline-level="3">5.<text:span text:style-name="Strong_20_Emphasis">Copy</text:span> <text:span text:style-name="Strong_20_Emphasis">command</text:span>:</text:h>
      <text:p text:style-name="P6"><text:span text:style-name="Source_20_Text"><text:tab/></text:span><text:span text:style-name="Source_20_Text"><text:span text:style-name="T2">scp</text:span></text:span><text:span text:style-name="Source_20_Text"> </text:span><text:span text:style-name="Source_20_Text"><text:span text:style-name="T2">myfile.txt</text:span></text:span><text:span text:style-name="Source_20_Text"> pi@</text:span><text:span text:style-name="Source_20_Text"><text:span text:style-name="T1">192.168.10.2</text:span></text:span><text:span text:style-name="Source_20_Text">:~</text:span> </text:p>
      <text:p text:style-name="P4"/>
      <text:h text:style-name="Heading_20_3" text:outline-level="3">Summary</text:h>
      <text:p text:style-name="Text_20_body">Direct Ethernet worked → no DHCP → we manually set IPs → then used ping/SSH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0T13:34:26.558387753</meta:creation-date>
    <dc:date>2026-05-30T13:44:35.427029698</dc:date>
    <meta:editing-duration>PT10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00" meta:character-count="606" meta:non-whitespace-character-count="524"/>
  </office:meta>
</office:document-meta>
</file>