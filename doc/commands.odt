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c1f3" officeooo:paragraph-rsid="001cc1f3"/>
    </style:style>
    <style:style style:name="P2" style:family="paragraph" style:parent-style-name="Standard">
      <style:text-properties fo:font-weight="bold" officeooo:rsid="001cc1f3" officeooo:paragraph-rsid="001cc1f3" style:font-weight-asian="bold" style:font-weight-complex="bold"/>
    </style:style>
    <style:style style:name="P3" style:family="paragraph" style:parent-style-name="Standard">
      <style:text-properties fo:font-weight="bold" officeooo:rsid="001cec41" officeooo:paragraph-rsid="001cec41" style:font-weight-asian="bold" style:font-weight-complex="bold"/>
    </style:style>
    <style:style style:name="P4" style:family="paragraph" style:parent-style-name="Standard">
      <style:text-properties style:text-position="0% 100%" fo:font-weight="bold" officeooo:rsid="0020e5ea" officeooo:paragraph-rsid="0020e5ea" style:font-weight-asian="bold" style:font-weight-complex="bold"/>
    </style:style>
    <style:style style:name="T1" style:family="text">
      <style:text-properties officeooo:rsid="001f97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4">Copy_command:</text:p>
      <text:p text:style-name="Standard">scp /home/umair/Data/04_C++/03_Demo/test_app_aarch64 <text:s/><text:a xlink:type="simple" xlink:href="mailto:umair@192.168.178.37" text:style-name="Internet_20_link" text:visited-style-name="Visited_20_Internet_20_Link">umair@192.168.178.37</text:a>:/home/umair/</text:p>
      <text:p text:style-name="Standard"/>
      <text:p text:style-name="Standard"/>
      <text:p text:style-name="Standard"/>
      <text:p text:style-name="P2">Build command:</text:p>
      <text:p text:style-name="P2"/>
      <text:p text:style-name="P3">cross-compile <text:span text:style-name="T1">tcp_client (raspberry </text:span>pi app<text:span text:style-name="T1">)</text:span>:</text:p>
      <text:p text:style-name="P1">aarch64-linux-gnu-g++ -std=c++17 -O2 -Wall -pthread -o test_app_aarch64 /home/umair/Data/04_C++/03_Demo/test_app.cpp</text:p>
      <text:p text:style-name="P1"/>
      <text:p text:style-name="P1"/>
      <text:p text:style-name="P3">compile tcp_server:</text:p>
      <text:p text:style-name="P1">g++ -std=c++17 -O2 -Wall -pthread -o tcp_server tcp_server.cpp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7T16:52:30.857073606</meta:creation-date>
    <meta:generator>LibreOffice/7.3.7.2$Linux_X86_64 LibreOffice_project/30$Build-2</meta:generator>
    <dc:date>2026-05-30T14:04:59.787693004</dc:date>
    <meta:editing-duration>P1DT42M48S</meta:editing-duration>
    <meta:editing-cycles>7</meta:editing-cycles>
    <meta:document-statistic meta:table-count="0" meta:image-count="0" meta:object-count="0" meta:page-count="1" meta:paragraph-count="7" meta:word-count="29" meta:character-count="355" meta:non-whitespace-character-count="332"/>
  </office:meta>
</office:document-meta>
</file>